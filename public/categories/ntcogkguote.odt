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000000120952933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3.5042in" table:align="left"/>
    </style:style>
    <style:style style:name="Table1.A" style:family="table-column">
      <style:table-column-properties style:column-width="2.5889in"/>
    </style:style>
    <style:style style:name="Table1.B" style:family="table-column">
      <style:table-column-properties style:column-width="0.91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2944in" table:align="left"/>
    </style:style>
    <style:style style:name="Table2.A" style:family="table-column">
      <style:table-column-properties style:column-width="3.3792in"/>
    </style:style>
    <style:style style:name="Table2.B" style:family="table-column">
      <style:table-column-properties style:column-width="0.9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Ubuntu"/>
    </style:style>
    <style:style style:name="P2" style:family="paragraph" style:parent-style-name="Heading_20_1">
      <style:text-properties style:font-name="Ubuntu" officeooo:paragraph-rsid="000f2480"/>
    </style:style>
    <style:style style:name="P3" style:family="paragraph" style:parent-style-name="Heading_20_1">
      <style:text-properties style:font-name="Ubuntu" fo:font-size="16pt" style:font-size-asian="16pt" style:font-size-complex="16pt"/>
    </style:style>
    <style:style style:name="P4" style:family="paragraph" style:parent-style-name="Heading_20_2">
      <style:text-properties style:font-name="Ubuntu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Heading_20_2">
      <style:text-properties style:font-name="Ubuntu" fo:font-size="14pt" style:font-size-asian="14pt" style:font-size-complex="14pt"/>
    </style:style>
    <style:style style:name="P6" style:family="paragraph" style:parent-style-name="Heading_20_3">
      <style:text-properties style:font-name="Ubuntu"/>
    </style:style>
    <style:style style:name="P7" style:family="paragraph" style:parent-style-name="Standard">
      <style:text-properties style:font-name="Ubuntu"/>
    </style:style>
    <style:style style:name="P8" style:family="paragraph" style:parent-style-name="Table_20_Contents">
      <style:paragraph-properties fo:text-align="center" style:justify-single-word="false"/>
      <style:text-properties style:font-name="Ubuntu"/>
    </style:style>
    <style:style style:name="P9" style:family="paragraph" style:parent-style-name="Table_20_Heading">
      <style:paragraph-properties fo:text-align="center" style:justify-single-word="false"/>
      <style:text-properties style:font-name="Ubuntu"/>
    </style:style>
    <style:style style:name="P10" style:family="paragraph" style:parent-style-name="Table_20_Heading">
      <style:text-properties style:font-name="Ubuntu"/>
    </style:style>
    <style:style style:name="P11" style:family="paragraph" style:parent-style-name="Table_20_Heading">
      <style:paragraph-properties fo:text-align="end" style:justify-single-word="false"/>
      <style:text-properties style:font-name="Ubuntu"/>
    </style:style>
    <style:style style:name="P12" style:family="paragraph" style:parent-style-name="Text_20_body">
      <style:text-properties style:font-name="Ubuntu"/>
    </style:style>
    <style:style style:name="P13" style:family="paragraph" style:parent-style-name="Text_20_body" style:list-style-name="L1">
      <style:text-properties style:font-name="Ubuntu"/>
    </style:style>
    <style:style style:name="P14" style:family="paragraph" style:parent-style-name="Text_20_body" style:list-style-name="L2">
      <style:text-properties style:font-name="Ubuntu"/>
    </style:style>
    <style:style style:name="P15" style:family="paragraph" style:parent-style-name="Text_20_body" style:list-style-name="L3">
      <style:text-properties style:font-name="Ubuntu"/>
    </style:style>
    <style:style style:name="P16" style:family="paragraph" style:parent-style-name="Text_20_body" style:list-style-name="L4">
      <style:text-properties style:font-name="Ubuntu"/>
    </style:style>
    <style:style style:name="P17" style:family="paragraph" style:parent-style-name="Text_20_body" style:list-style-name="L5">
      <style:text-properties style:font-name="Ubuntu"/>
    </style:style>
    <style:style style:name="P18" style:family="paragraph" style:parent-style-name="Text_20_body" style:list-style-name="L6">
      <style:text-properties style:font-name="Ubuntu"/>
    </style:style>
    <style:style style:name="P19" style:family="paragraph" style:parent-style-name="Text_20_body" style:list-style-name="L7">
      <style:text-properties style:font-name="Ubuntu"/>
    </style:style>
    <style:style style:name="P20" style:family="paragraph" style:parent-style-name="Text_20_body" style:list-style-name="L8">
      <style:text-properties style:font-name="Ubuntu"/>
    </style:style>
    <style:style style:name="P21" style:family="paragraph" style:parent-style-name="Text_20_body" style:list-style-name="L9">
      <style:text-properties style:font-name="Ubuntu"/>
    </style:style>
    <style:style style:name="P22" style:family="paragraph" style:parent-style-name="Text_20_body" style:list-style-name="L10">
      <style:text-properties style:font-name="Ubuntu"/>
    </style:style>
    <style:style style:name="P23" style:family="paragraph" style:parent-style-name="Text_20_body" style:list-style-name="L11">
      <style:text-properties style:font-name="Ubuntu"/>
    </style:style>
    <style:style style:name="P24" style:family="paragraph" style:parent-style-name="Text_20_body" style:list-style-name="L12">
      <style:text-properties style:font-name="Ubuntu"/>
    </style:style>
    <style:style style:name="P25" style:family="paragraph" style:parent-style-name="Text_20_body" style:list-style-name="L13">
      <style:text-properties style:font-name="Ubuntu"/>
    </style:style>
    <style:style style:name="P26" style:family="paragraph" style:parent-style-name="Text_20_body" style:list-style-name="L14">
      <style:text-properties style:font-name="Ubuntu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339a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f339a"/>
    </style:style>
    <style:style style:name="T6" style:family="text">
      <style:text-properties fo:font-style="normal" officeooo:rsid="000f339a" style:font-style-asian="normal" style:font-style-complex="normal"/>
    </style:style>
    <style:style style:name="T7" style:family="text">
      <style:text-properties fo:font-style="normal" fo:font-weight="normal" officeooo:rsid="000f339a" style:font-style-asian="normal" style:font-weight-asian="normal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underline-style="dotted" style:text-underline-width="auto" style:text-und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Ubuntu"/>
    </style:style>
    <style:style style:name="T13" style:family="text">
      <style:text-properties style:font-name="Ubuntu" fo:font-size="14pt" style:font-size-asian="14pt" style:font-size-complex="14pt"/>
    </style:style>
    <style:style style:name="T14" style:family="text">
      <style:text-properties style:font-name="Ubuntu" officeooo:rsid="000f339a"/>
    </style:style>
    <style:style style:name="T15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Ubuntu" fo:font-style="italic" style:font-style-asian="italic" style:font-style-complex="italic"/>
    </style:style>
    <style:style style:name="T17" style:family="text">
      <style:text-properties style:font-name="Ubuntu" fo:font-style="italic" officeooo:rsid="000f339a" style:font-style-asian="italic" style:font-style-complex="italic"/>
    </style:style>
    <style:style style:name="T18" style:family="text">
      <style:text-properties style:font-name="Ubuntu" fo:font-style="normal" fo:font-weight="normal" officeooo:rsid="000f339a" style:font-style-asian="normal" style:font-weight-asian="normal" style:font-style-complex="normal" style:font-weight-complex="normal"/>
    </style:style>
    <style:style style:name="T19" style:family="text">
      <style:text-properties style:font-name="Ubuntu" style:text-underline-style="dotte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/><text:span text:style-name="T10">OMYTECH KENYA</text:span><draw:frame draw:style-name="fr1" draw:name="Image1" text:anchor-type="char" svg:x="0.0075in" svg:y="0.0465in" svg:width="0.7819in" svg:height="0.6465in" draw:z-index="0"><draw:image xlink:href="Pictures/100000000000012000000120952933B9.png" xlink:type="simple" xlink:show="embed" xlink:actuate="onLoad" draw:mime-type="image/png"/></draw:frame></text:h>
      <text:h text:style-name="P4" text:outline-level="2">WEBSITE DEVELOPMENT PROPOSAL, QUOTATION &amp; MAINTENANCE AGREEMENT</text:h>
      <text:p text:style-name="Text_20_body"><text:span text:style-name="Strong_20_Emphasis"><text:span text:style-name="T13">Quotation Reference:</text:span></text:span><text:span text:style-name="T12"> </text:span><text:span text:style-name="T16">OMY-NTCG</text:span><text:span text:style-name="T17">O</text:span><text:span text:style-name="T16">K-2026-001</text:span></text:p>
      <text:h text:style-name="P6" text:outline-level="3">Prepared For:</text:h>
      <text:p text:style-name="Text_20_body"><text:span text:style-name="Strong_20_Emphasis"><text:span text:style-name="T15">New Testament Church of God Kenya</text:span></text:span><text:a xlink:type="simple" xlink:href="https://omytech.co.ke/" text:style-name="Internet_20_link" text:visited-style-name="Visited_20_Internet_20_Link"/></text:p>
      <text:h text:style-name="P6" text:outline-level="3">Prepared By:</text:h>
      <text:p text:style-name="Text_20_body"><text:span text:style-name="Strong_20_Emphasis"><text:span text:style-name="T15">OMYTECH Kenya</text:span></text:span></text:p>
      <text:h text:style-name="P6" text:outline-level="3">Project Lead</text:h>
      <text:p text:style-name="Text_20_body"><text:span text:style-name="Strong_20_Emphasis"><text:span text:style-name="T15">Omillo Charles</text:span></text:span></text:p>
      <text:h text:style-name="Heading_20_3" text:outline-level="3"><text:span text:style-name="T12">Contact Information</text:span><text:a xlink:type="simple" xlink:href="https://omytech.co.ke/" text:style-name="Internet_20_link" text:visited-style-name="Visited_20_Internet_20_Link"><text:span text:style-name="T17"/></text:a></text:h>
      <text:p text:style-name="Text_20_body"><text:span text:style-name="T12">Email: </text:span><text:a xlink:type="simple" xlink:href="mailto:info@omytech.co.ke" text:style-name="Internet_20_link" text:visited-style-name="Visited_20_Internet_20_Link"><text:span text:style-name="T12">info@omytech.co.ke</text:span></text:a></text:p>
      <text:p text:style-name="Text_20_body"><text:span text:style-name="T12">Website: </text:span><text:a xlink:type="simple" xlink:href="https://omytech.co.ke/" text:style-name="Internet_20_link" text:visited-style-name="Visited_20_Internet_20_Link"><text:span text:style-name="Strong_20_Emphasis"><text:span text:style-name="T18">omytech.co.ke</text:span></text:span></text:a></text:p>
      <text:p text:style-name="P12">Date: ______________________</text:p>
      <text:p text:style-name="P1"/>
      <text:h text:style-name="P3" text:outline-level="1">1. COMPANY PROFILE</text:h>
      <text:h text:style-name="P5" text:outline-level="2">About OMYTECH Kenya</text:h>
      <text:p text:style-name="P12">OMYTECH Kenya is a technology solutions company specializing in modern web development, software engineering, digital transformation, and business technology solutions.</text:p>
      <text:p text:style-name="P12">OMYTECH Kenya is committed to delivering secure, scalable, and high-performance digital solutions tailored to the needs of organizations, businesses, institutions, and communities.</text:p>
      <text:p text:style-name="P12">This proposal outlines the development, deployment, maintenance, and support of the New Testament Church of God Kenya Website.</text:p>
      <text:h text:style-name="P3" text:outline-level="1">2. PROJECT OVERVIEW</text:h>
      <text:p text:style-name="P12">The objective of this project is to provide New Testament Church of God Kenya with a modern, secure, scalable, and search-engine-optimized digital platform that facilitates communication, member engagement, church administration, event management, and future digital growth.</text:p>
      <text:p text:style-name="P12"><text:soft-page-break/>The website shall serve church leadership, members, visitors, and administrators through an integrated online platform accessible across desktop and mobile devices.</text:p>
      <text:h text:style-name="P3" text:outline-level="1">3. PROJECT SCOPE</text:h>
      <text:p text:style-name="P12">The website shall include, but shall not be limited to, the following features:</text:p>
      <text:h text:style-name="P5" text:outline-level="2">Public Website</text:h>
      <text:list text:style-name="L1">
        <text:list-item>
          <text:p text:style-name="P13">Up to twenty (20) professionally designed pages</text:p>
        </text:list-item>
        <text:list-item>
          <text:p text:style-name="P13">Mobile-responsive design</text:p>
        </text:list-item>
        <text:list-item>
          <text:p text:style-name="P13">Search Engine Optimization (SEO)</text:p>
        </text:list-item>
        <text:list-item>
          <text:p text:style-name="P13">Contact forms</text:p>
        </text:list-item>
        <text:list-item>
          <text:p text:style-name="P13">Church information pages</text:p>
        </text:list-item>
        <text:list-item>
          <text:p text:style-name="P13">Ministries pages</text:p>
        </text:list-item>
        <text:list-item>
          <text:p text:style-name="P13">Events pages</text:p>
        </text:list-item>
        <text:list-item>
          <text:p text:style-name="P13">Social media integration</text:p>
        </text:list-item>
        <text:list-item>
          <text:p text:style-name="P13">Google Maps integration</text:p>
        </text:list-item>
      </text:list>
      <text:h text:style-name="P5" text:outline-level="2">Authentication &amp; Security</text:h>
      <text:list text:style-name="L2">
        <text:list-item>
          <text:p text:style-name="P14">Secure Email and Password Authentication</text:p>
        </text:list-item>
        <text:list-item>
          <text:p text:style-name="P14">Google Authentication</text:p>
        </text:list-item>
        <text:list-item>
          <text:p text:style-name="P14">GitHub Authentication</text:p>
        </text:list-item>
        <text:list-item>
          <text:p text:style-name="P14">Email Verification via OTP</text:p>
        </text:list-item>
        <text:list-item>
          <text:p text:style-name="P14">Forgot Password Functionality</text:p>
        </text:list-item>
        <text:list-item>
          <text:p text:style-name="P14">Password Reset Functionality</text:p>
        </text:list-item>
        <text:list-item>
          <text:p text:style-name="P14">Secure Session Management</text:p>
        </text:list-item>
        <text:list-item>
          <text:p text:style-name="P14">Role-Based Access Control</text:p>
        </text:list-item>
      </text:list>
      <text:h text:style-name="P5" text:outline-level="2">Member Portal</text:h>
      <text:list text:style-name="L3">
        <text:list-item>
          <text:p text:style-name="P15">Personalized Member Dashboard</text:p>
        </text:list-item>
        <text:list-item>
          <text:p text:style-name="P15">Profile Management</text:p>
        </text:list-item>
        <text:list-item>
          <text:p text:style-name="P15">Access to Member-Specific Content</text:p>
        </text:list-item>
        <text:list-item>
          <text:p text:style-name="P15">Event Registration Management</text:p>
        </text:list-item>
        <text:list-item>
          <text:p text:style-name="P15">Account Settings</text:p>
        </text:list-item>
      </text:list>
      <text:h text:style-name="P5" text:outline-level="2"><text:soft-page-break/>Clergy &amp; Administration Portal</text:h>
      <text:list text:style-name="L4">
        <text:list-item>
          <text:p text:style-name="P16">Administrative Dashboard</text:p>
        </text:list-item>
        <text:list-item>
          <text:p text:style-name="P16">User Management</text:p>
        </text:list-item>
        <text:list-item>
          <text:p text:style-name="P16">Content Management</text:p>
        </text:list-item>
        <text:list-item>
          <text:p text:style-name="P16">Announcement Management</text:p>
        </text:list-item>
        <text:list-item>
          <text:p text:style-name="P16">Event Management</text:p>
        </text:list-item>
        <text:list-item>
          <text:p text:style-name="P16">Access Control Management</text:p>
        </text:list-item>
      </text:list>
      <text:h text:style-name="P5" text:outline-level="2">Event Registration Platform</text:h>
      <text:list text:style-name="L5">
        <text:list-item>
          <text:p text:style-name="P17">Event Creation</text:p>
        </text:list-item>
        <text:list-item>
          <text:p text:style-name="P17">Event Publishing</text:p>
        </text:list-item>
        <text:list-item>
          <text:p text:style-name="P17">Secure Registration</text:p>
        </text:list-item>
        <text:list-item>
          <text:p text:style-name="P17">Registration Tracking</text:p>
        </text:list-item>
        <text:list-item>
          <text:p text:style-name="P17">Participant Management</text:p>
        </text:list-item>
      </text:list>
      <text:h text:style-name="P5" text:outline-level="2">Announcement Management Platform</text:h>
      <text:list text:style-name="L6">
        <text:list-item>
          <text:p text:style-name="P18">Announcement Creation</text:p>
        </text:list-item>
        <text:list-item>
          <text:p text:style-name="P18">Announcement Publishing</text:p>
        </text:list-item>
        <text:list-item>
          <text:p text:style-name="P18">Announcement Management</text:p>
        </text:list-item>
        <text:list-item>
          <text:p text:style-name="P18">Announcement Visibility Controls</text:p>
        </text:list-item>
      </text:list>
      <text:h text:style-name="P5" text:outline-level="2">Payment Integration</text:h>
      <text:list text:style-name="L7">
        <text:list-item>
          <text:p text:style-name="P19">M-Pesa Integration</text:p>
        </text:list-item>
        <text:list-item>
          <text:p text:style-name="P19">Secure Transaction Processing</text:p>
        </text:list-item>
      </text:list>
      <text:h text:style-name="P5" text:outline-level="2">Additional Features</text:h>
      <text:list text:style-name="L8">
        <text:list-item>
          <text:p text:style-name="P20">Secure Database Integration</text:p>
        </text:list-item>
        <text:list-item>
          <text:p text:style-name="P20">Performance Optimization</text:p>
        </text:list-item>
        <text:list-item>
          <text:p text:style-name="P20">Security Best Practices</text:p>
        </text:list-item>
        <text:list-item>
          <text:p text:style-name="P20">Scalable Architecture</text:p>
        </text:list-item>
        <text:list-item>
          <text:p text:style-name="P20">Future Expansion Readiness</text:p>
        </text:list-item>
      </text:list>
      <text:h text:style-name="P3" text:outline-level="1">4. PROJECT DELIVERABLES</text:h>
      <text:p text:style-name="P12">Upon completion, OMYTECH Kenya shall provide:</text:p>
      <text:list text:style-name="L9">
        <text:list-item>
          <text:p text:style-name="P21">Fully Functional Church Website</text:p>
        </text:list-item>
        <text:list-item>
          <text:p text:style-name="P21"><text:soft-page-break/>Deployment Assistance</text:p>
        </text:list-item>
        <text:list-item>
          <text:p text:style-name="P21">Administrative Access</text:p>
        </text:list-item>
        <text:list-item>
          <text:p text:style-name="P21">Basic Technical Documentation</text:p>
        </text:list-item>
        <text:list-item>
          <text:p text:style-name="P21">User Account Management System</text:p>
        </text:list-item>
        <text:list-item>
          <text:p text:style-name="P21">Event Registration System</text:p>
        </text:list-item>
        <text:list-item>
          <text:p text:style-name="P21">Announcement Management System</text:p>
        </text:list-item>
        <text:list-item>
          <text:p text:style-name="P21">Member Portal</text:p>
        </text:list-item>
        <text:list-item>
          <text:p text:style-name="P21">Clergy Portal</text:p>
        </text:list-item>
      </text:list>
      <text:h text:style-name="P3" text:outline-level="1">5. PROJECT COSTS</text:h>
      <text:h text:style-name="P5" text:outline-level="2">Website Development &amp; Initial Setup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Service</text:p>
            </table:table-cell>
            <table:table-cell table:style-name="Table1.A1" office:value-type="string">
              <text:p text:style-name="P9">Cost (KES)</text:p>
            </table:table-cell>
          </table:table-row>
        </table:table-header-rows>
        <table:table-row>
          <table:table-cell table:style-name="Table1.A1" office:value-type="string">
            <text:p text:style-name="P8">Website Development &amp; Initial Setup</text:p>
          </table:table-cell>
          <table:table-cell table:style-name="Table1.A1" office:value-type="string">
            <text:p text:style-name="P8">20,000</text:p>
          </table:table-cell>
        </table:table-row>
      </table:table>
      <text:h text:style-name="P6" text:outline-level="3">Optional Hosting &amp; Deployment Assistanc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Service</text:p>
            </table:table-cell>
            <table:table-cell table:style-name="Table2.A1" office:value-type="string">
              <text:p text:style-name="P11">Cost (KES)</text:p>
            </table:table-cell>
          </table:table-row>
        </table:table-header-rows>
        <table:table-row>
          <table:table-cell table:style-name="Table2.A1" office:value-type="string">
            <text:p text:style-name="P8">Hosting Configuration &amp; Deployment Assistance</text:p>
          </table:table-cell>
          <table:table-cell table:style-name="Table2.A1" office:value-type="string">
            <text:p text:style-name="P8">10,000</text:p>
          </table:table-cell>
        </table:table-row>
      </table:table>
      <text:h text:style-name="P6" text:outline-level="3">Total Cost (Including Hosting Setup Assistance)</text:h>
      <text:p text:style-name="Text_20_body"><text:span text:style-name="Strong_20_Emphasis"><text:span text:style-name="T12">→ </text:span></text:span><text:span text:style-name="Strong_20_Emphasis"><text:span text:style-name="T19">KES 30,000</text:span></text:span></text:p>
      <text:h text:style-name="P3" text:outline-level="1">6. THIRD-PARTY SERVICES</text:h>
      <text:p text:style-name="P12">The following services are not included in the development fee and shall be paid separately by New Testament Church of God Kenya:</text:p>
      <text:list text:style-name="L10">
        <text:list-item>
          <text:p text:style-name="P22">Domain Registration</text:p>
        </text:list-item>
        <text:list-item>
          <text:p text:style-name="P22">Domain Renewal</text:p>
        </text:list-item>
        <text:list-item>
          <text:p text:style-name="P22">Website Hosting</text:p>
        </text:list-item>
        <text:list-item>
          <text:p text:style-name="P22">Hosting Renewal</text:p>
        </text:list-item>
        <text:list-item>
          <text:p text:style-name="P22">Professional Email Services</text:p>
        </text:list-item>
        <text:list-item>
          <text:p text:style-name="P22">SMS Services</text:p>
        </text:list-item>
        <text:list-item>
          <text:p text:style-name="P22">Premium Third-Party Integrations</text:p>
        </text:list-item>
        <text:list-item>
          <text:p text:style-name="P22">Cloud Infrastructure Services</text:p>
        </text:list-item>
        <text:list-item>
          <text:p text:style-name="P22">Any Other External Service Subscriptions</text:p>
        </text:list-item>
      </text:list>
      <text:p text:style-name="P12">These costs shall be charged according to the rates of the respective service providers.</text:p>
      <text:h text:style-name="P3" text:outline-level="1"><text:soft-page-break/>7. MAINTENANCE &amp; SUPPORT</text:h>
      <text:p text:style-name="P12">Following successful deployment, OMYTECH Kenya shall provide maintenance and support services upon request.</text:p>
      <text:h text:style-name="P5" text:outline-level="2">Annual Maintenance Fee</text:h>
      <text:p text:style-name="Text_20_body"><text:span text:style-name="Strong_20_Emphasis"><text:span text:style-name="T12">KES 7,000 Per Year</text:span></text:span></text:p>
      <text:p text:style-name="P12">The maintenance package includes:</text:p>
      <text:list text:style-name="L11">
        <text:list-item>
          <text:p text:style-name="P23">Minor Content Updates</text:p>
        </text:list-item>
        <text:list-item>
          <text:p text:style-name="P23">Minor Design Adjustments</text:p>
        </text:list-item>
        <text:list-item>
          <text:p text:style-name="P23">Technical Support</text:p>
        </text:list-item>
        <text:list-item>
          <text:p text:style-name="P23">Security Updates</text:p>
        </text:list-item>
        <text:list-item>
          <text:p text:style-name="P23">Bug Fixes</text:p>
        </text:list-item>
        <text:list-item>
          <text:p text:style-name="P23">System Monitoring Assistance</text:p>
        </text:list-item>
        <text:list-item>
          <text:p text:style-name="P23">Domain &amp; Hosting Renewal Assistance</text:p>
        </text:list-item>
      </text:list>
      <text:h text:style-name="P3" text:outline-level="1">8. EXCLUSIONS</text:h>
      <text:p text:style-name="P12">The annual maintenance fee does not include:</text:p>
      <text:list text:style-name="L12">
        <text:list-item>
          <text:p text:style-name="P24">Complete Website Redesigns</text:p>
        </text:list-item>
        <text:list-item>
          <text:p text:style-name="P24">Mobile Application Development</text:p>
        </text:list-item>
        <text:list-item>
          <text:p text:style-name="P24">Major Feature Additions</text:p>
        </text:list-item>
        <text:list-item>
          <text:p text:style-name="P24">New Modules</text:p>
        </text:list-item>
        <text:list-item>
          <text:p text:style-name="P24">Custom Integrations Not Included in Original Scope</text:p>
        </text:list-item>
        <text:list-item>
          <text:p text:style-name="P24">Large Database Migrations</text:p>
        </text:list-item>
        <text:list-item>
          <text:p text:style-name="P24">Third-Party Service Charges</text:p>
        </text:list-item>
      </text:list>
      <text:p text:style-name="P12">Such requests shall be quoted separately.</text:p>
      <text:h text:style-name="P3" text:outline-level="1">9. CHANGE REQUEST POLICY</text:h>
      <text:p text:style-name="P12">Any feature or functionality requested after completion of the agreed project scope shall be considered a change request.</text:p>
      <text:p text:style-name="P12">Examples include:</text:p>
      <text:list text:style-name="L13">
        <text:list-item>
          <text:p text:style-name="P25">Live Streaming Systems</text:p>
        </text:list-item>
        <text:list-item>
          <text:p text:style-name="P25">Online Learning Platforms</text:p>
        </text:list-item>
        <text:list-item>
          <text:p text:style-name="P25">SMS Notification Systems</text:p>
        </text:list-item>
        <text:list-item>
          <text:p text:style-name="P25">Mobile Applications</text:p>
        </text:list-item>
        <text:list-item>
          <text:p text:style-name="P25"><text:soft-page-break/>Donation Management Systems</text:p>
        </text:list-item>
        <text:list-item>
          <text:p text:style-name="P25">Advanced Reporting Systems</text:p>
        </text:list-item>
        <text:list-item>
          <text:p text:style-name="P25">Additional Payment Integrations</text:p>
        </text:list-item>
      </text:list>
      <text:p text:style-name="P12">OMYTECH Kenya shall provide separate quotations for such enhancements.</text:p>
      <text:h text:style-name="P3" text:outline-level="1">10. PAYMENT TERMS</text:h>
      <text:p text:style-name="P12">The following payment structure shall apply:</text:p>
      <text:h text:style-name="P6" text:outline-level="3">Development Fee</text:h>
      <text:p text:style-name="P12">KES 20,000</text:p>
      <text:h text:style-name="P6" text:outline-level="3">Optional Hosting &amp; Deployment Assistance</text:h>
      <text:p text:style-name="P12">KES 10,000</text:p>
      <text:h text:style-name="P6" text:outline-level="3">Annual Maintenance &amp; Support</text:h>
      <text:p text:style-name="P12">KES 7,000</text:p>
      <text:h text:style-name="P6" text:outline-level="3">Third-Party Services</text:h>
      <text:p text:style-name="P12">Charged separately at actual provider rates.</text:p>
      <text:p text:style-name="P12">Payments shall be made according to the agreed schedule between New Testament Church of God Kenya and OMYTECH Kenya.</text:p>
      <text:h text:style-name="P3" text:outline-level="1">11. WEBSITE OWNERSHIP</text:h>
      <text:p text:style-name="P12">Upon full payment of all agreed fees, ownership of the website, church content, and church data shall belong to New Testament Church of God Kenya.</text:p>
      <text:p text:style-name="P12">OMYTECH Kenya shall retain the right to reference the project in its professional portfolio, company profile, case studies, presentations, and marketing materials unless otherwise agreed in writing.</text:p>
      <text:h text:style-name="P3" text:outline-level="1">12. PROJECT TIMELINE</text:h>
      <text:p text:style-name="P12">The project shall be delivered upon completion of:</text:p>
      <text:list text:style-name="L14">
        <text:list-item>
          <text:p text:style-name="P26">Development</text:p>
        </text:list-item>
        <text:list-item>
          <text:p text:style-name="P26">Testing</text:p>
        </text:list-item>
        <text:list-item>
          <text:p text:style-name="P26">Quality Assurance</text:p>
        </text:list-item>
        <text:list-item>
          <text:p text:style-name="P26">Deployment</text:p>
        </text:list-item>
      </text:list>
      <text:p text:style-name="P12">Any delays arising from content submissions, approvals, third-party services, or external factors shall not be considered delays attributable to OMYTECH Kenya.</text:p>
      <text:h text:style-name="P3" text:outline-level="1"><text:soft-page-break/>13. ACCEPTANCE</text:h>
      <text:p text:style-name="P12">By signing below, the parties acknowledge and accept the terms contained in this Website Development Proposal, Quotation, and Maintenance Agreement.</text:p>
      <text:h text:style-name="P5" text:outline-level="2">For New Testament Church of God Kenya</text:h>
      <text:p text:style-name="P12">Name: ______________________________________</text:p>
      <text:p text:style-name="P12">Position: ____________________________________</text:p>
      <text:p text:style-name="P12">Signature: __________________________________</text:p>
      <text:p text:style-name="P12">Date: _______________________________________</text:p>
      <text:p text:style-name="P1"/>
      <text:h text:style-name="P5" text:outline-level="2">For OMYTECH Kenya</text:h>
      <text:p text:style-name="P12">Representative: Omillo Charles</text:p>
      <text:p text:style-name="P12">Position: Founder &amp; Project Lead</text:p>
      <text:p text:style-name="P12">Signature: __________________________________</text:p>
      <text:p text:style-name="P12">Date: _______________________________________</text:p>
      <text:p text:style-name="P1"/>
      <text:p text:style-name="Text_20_body"><text:span text:style-name="Strong_20_Emphasis"><text:span text:style-name="T16">END OF DOCUMENT</text:span>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2T12:37:01.956332547</meta:creation-date>
    <dc:date>2026-06-03T10:28:36.111636293</dc:date>
    <meta:editing-duration>PT18H28M26S</meta:editing-duration>
    <meta:editing-cycles>1</meta:editing-cycles>
    <meta:document-statistic meta:table-count="2" meta:image-count="1" meta:object-count="0" meta:page-count="7" meta:paragraph-count="178" meta:word-count="880" meta:character-count="6277" meta:non-whitespace-character-count="5661"/>
    <meta:generator>LibreOffice/24.2.7.2$Linux_X86_64 LibreOffice_project/420$Build-2</meta:generator>
  </office:meta>
</office:document-meta>
</file>